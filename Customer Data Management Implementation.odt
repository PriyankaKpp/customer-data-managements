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background-color="#FFFF00"/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Courier New" fo:color="#F5871F" style:letter-kerning="false" fo:font-size="10.5pt" style:font-size-asian="10.5pt" style:font-size-complex="10.5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" style:parent-style-name="DefaultParagraphFont" style:family="text">
      <style:text-properties style:font-name="Consolas" style:font-name-asian="Times New Roman" style:font-name-complex="Courier New" fo:color="#C82829" style:letter-kerning="false" fo:font-size="10.5pt" style:font-size-asian="10.5pt" style:font-size-complex="10.5pt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1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" style:parent-style-name="DefaultParagraphFont" style:family="text">
      <style:text-properties style:font-name="Consolas" style:font-name-asian="Times New Roman" style:font-name-complex="Courier New" fo:color="#C82829" style:letter-kerning="false" fo:font-size="10.5pt" style:font-size-asian="10.5pt" style:font-size-complex="10.5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Consolas" style:font-name-asian="Times New Roman" style:font-name-complex="Courier New" fo:color="#C82829" style:letter-kerning="false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7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" style:parent-style-name="DefaultParagraphFont" style:family="text">
      <style:text-properties style:font-name="Consolas" style:font-name-asian="Times New Roman" style:font-name-complex="Courier New" fo:color="#C82829" style:letter-kerning="false" fo:font-size="10.5pt" style:font-size-asian="10.5pt" style:font-size-complex="10.5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20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21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22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26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3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32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3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38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4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50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5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56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60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62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64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66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68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70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7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76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7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78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80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82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86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88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8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90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92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94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98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00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0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0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06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10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Courier New" fo:color="#F5871F" style:letter-kerning="false" fo:font-size="10.5pt" style:font-size-asian="10.5pt" style:font-size-complex="10.5pt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16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Courier New" fo:color="#F5871F" style:letter-kerning="false" fo:font-size="10.5pt" style:font-size-asian="10.5pt" style:font-size-complex="10.5pt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22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2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26" style:parent-style-name="DefaultParagraphFont" style:family="text">
      <style:text-properties style:font-name="Consolas" style:font-name-asian="Times New Roman" style:font-name-complex="Courier New" fo:color="#F5871F" style:letter-kerning="false" fo:font-size="10.5pt" style:font-size-asian="10.5pt" style:font-size-complex="10.5pt" style:language-asian="en" style:country-asian="GB"/>
    </style:style>
    <style:style style:name="T12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28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3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32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3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40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44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14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46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52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54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Courier New" fo:color="#718C00" style:letter-kerning="false" fo:font-size="10.5pt" style:font-size-asian="10.5pt" style:font-size-complex="10.5pt" style:language-asian="en" style:country-asian="GB"/>
    </style:style>
    <style:style style:name="P157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P158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fo:background-color="#FFFF00" style:language-asian="en" style:country-asian="GB"/>
    </style:style>
    <style:style style:name="T161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fo:background-color="#FFFF00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Courier New" fo:color="#F5871F" style:letter-kerning="false" fo:font-size="10.5pt" style:font-size-asian="10.5pt" style:font-size-complex="10.5pt" fo:background-color="#FFFF00" style:language-asian="en" style:country-asian="GB"/>
    </style:style>
    <style:style style:name="T163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fo:background-color="#FFFF00" style:language-asian="en" style:country-asian="GB"/>
    </style:style>
    <style:style style:name="P164" style:parent-style-name="Normal" style:family="paragraph">
      <style:paragraph-properties style:line-break="normal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5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name="T166" style:parent-style-name="DefaultParagraphFont" style:family="text">
      <style:text-properties style:font-name="Consolas" style:font-name-asian="Times New Roman" style:font-name-complex="Courier New" fo:color="#EAB700" style:letter-kerning="false" fo:font-size="10.5pt" style:font-size-asian="10.5pt" style:font-size-complex="10.5pt" fo:background-color="#FFFF00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fo:background-color="#FFFF00" style:language-asian="en" style:country-asian="GB"/>
    </style:style>
    <style:style style:name="T168" style:parent-style-name="DefaultParagraphFont" style:family="text">
      <style:text-properties style:font-name="Consolas" style:font-name-asian="Times New Roman" style:font-name-complex="Courier New" fo:color="#F5871F" style:letter-kerning="false" fo:font-size="10.5pt" style:font-size-asian="10.5pt" style:font-size-complex="10.5pt" fo:background-color="#FFFF00" style:language-asian="en" style:country-asian="GB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Courier New" fo:color="#4D4D4C" style:letter-kerning="false" fo:font-size="10.5pt" style:font-size-asian="10.5pt" style:font-size-complex="10.5pt" style:language-asian="en" style:country-asian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ustomer Data Management Implementation:</text:p>
      <text:p text:style-name="Normal"><text:span text:style-name="T2">GET CUSTOMER BY ID<text:s/></text:span><text:span text:style-name="T3">Sample Response:</text:span></text:p>
      <text:p text:style-name="P4"><text:span text:style-name="T5">HTTP/1.1<text:s/></text:span><text:span text:style-name="T6">200</text:span><text:span text:style-name="T7"><text:s/></text:span></text:p>
      <text:p text:style-name="P8"><text:span text:style-name="T9">Content-Type</text:span><text:span text:style-name="T10">: application/json</text:span></text:p>
      <text:p text:style-name="P11"><text:span text:style-name="T12">Transfer-Encoding</text:span><text:span text:style-name="T13">: chunked</text:span></text:p>
      <text:p text:style-name="P14"><text:span text:style-name="T15">Date</text:span><text:span text:style-name="T16">: Fri, 19 Jun 2026 13:30:53 GMT</text:span></text:p>
      <text:p text:style-name="P17"><text:span text:style-name="T18">Connection</text:span><text:span text:style-name="T19">: close</text:span></text:p>
      <text:p text:style-name="P20"/>
      <text:p text:style-name="P21">{</text:p>
      <text:p text:style-name="P22"><text:span text:style-name="T23"><text:s text:c="2"/></text:span><text:span text:style-name="T24">"data"</text:span><text:span text:style-name="T25">: {</text:span></text:p>
      <text:p text:style-name="P26"><text:span text:style-name="T27"><text:s text:c="4"/></text:span><text:span text:style-name="T28">"customerId"</text:span><text:span text:style-name="T29">:<text:s/></text:span><text:span text:style-name="T30">"550e8400-e29b-41d4-a716-446655440000"</text:span><text:span text:style-name="T31">,</text:span></text:p>
      <text:p text:style-name="P32"><text:span text:style-name="T33"><text:s text:c="4"/></text:span><text:span text:style-name="T34">"firstName"</text:span><text:span text:style-name="T35">:<text:s/></text:span><text:span text:style-name="T36">"John"</text:span><text:span text:style-name="T37">,</text:span></text:p>
      <text:p text:style-name="P38"><text:span text:style-name="T39"><text:s text:c="4"/></text:span><text:span text:style-name="T40">"lastName"</text:span><text:span text:style-name="T41">:<text:s/></text:span><text:span text:style-name="T42">"Doe"</text:span><text:span text:style-name="T43">,</text:span></text:p>
      <text:p text:style-name="P44"><text:span text:style-name="T45"><text:s text:c="4"/></text:span><text:span text:style-name="T46">"email"</text:span><text:span text:style-name="T47">:<text:s/></text:span><text:span text:style-name="T48">"john.doe@example.com"</text:span><text:span text:style-name="T49">,</text:span></text:p>
      <text:p text:style-name="P50"><text:span text:style-name="T51"><text:s text:c="4"/></text:span><text:span text:style-name="T52">"phone"</text:span><text:span text:style-name="T53">:<text:s/></text:span><text:span text:style-name="T54">"+441234567890"</text:span><text:span text:style-name="T55">,</text:span></text:p>
      <text:p text:style-name="P56"><text:span text:style-name="T57"><text:s text:c="4"/></text:span><text:span text:style-name="T58">"address"</text:span><text:span text:style-name="T59">:<text:s/></text:span><text:span text:style-name="T60">"123 Baker Street"</text:span><text:span text:style-name="T61">,</text:span></text:p>
      <text:p text:style-name="P62"><text:span text:style-name="T63"><text:s text:c="4"/></text:span><text:span text:style-name="T64">"city"</text:span><text:span text:style-name="T65">:<text:s/></text:span><text:span text:style-name="T66">"London"</text:span><text:span text:style-name="T67">,</text:span></text:p>
      <text:p text:style-name="P68"><text:span text:style-name="T69"><text:s text:c="4"/></text:span><text:span text:style-name="T70">"state"</text:span><text:span text:style-name="T71">:<text:s/></text:span><text:span text:style-name="T72">"Greater London"</text:span><text:span text:style-name="T73">,</text:span></text:p>
      <text:p text:style-name="P74"><text:span text:style-name="T75"><text:s text:c="4"/></text:span><text:span text:style-name="T76">"postalCode"</text:span><text:span text:style-name="T77">:<text:s/></text:span><text:span text:style-name="T78">"NW1 6XE"</text:span><text:span text:style-name="T79">,</text:span></text:p>
      <text:p text:style-name="P80"><text:span text:style-name="T81"><text:s text:c="4"/></text:span><text:span text:style-name="T82">"country"</text:span><text:span text:style-name="T83">:<text:s/></text:span><text:span text:style-name="T84">"UK"</text:span><text:span text:style-name="T85">,</text:span></text:p>
      <text:p text:style-name="P86"><text:span text:style-name="T87"><text:s text:c="4"/></text:span><text:span text:style-name="T88">"birthDate"</text:span><text:span text:style-name="T89">:<text:s/></text:span><text:span text:style-name="T90">"1990-01-01"</text:span><text:span text:style-name="T91">,</text:span></text:p>
      <text:p text:style-name="P92"><text:span text:style-name="T93"><text:s text:c="4"/></text:span><text:span text:style-name="T94">"gender"</text:span><text:span text:style-name="T95">:<text:s/></text:span><text:span text:style-name="T96">"Male"</text:span><text:span text:style-name="T97">,</text:span></text:p>
      <text:p text:style-name="P98"><text:span text:style-name="T99"><text:s text:c="4"/></text:span><text:span text:style-name="T100">"preferredLanguage"</text:span><text:span text:style-name="T101">:<text:s/></text:span><text:span text:style-name="T102">"English"</text:span><text:span text:style-name="T103">,</text:span></text:p>
      <text:p text:style-name="P104"><text:span text:style-name="T105"><text:s text:c="4"/></text:span><text:span text:style-name="T106">"timezone"</text:span><text:span text:style-name="T107">:<text:s/></text:span><text:span text:style-name="T108">"Europe/London"</text:span><text:span text:style-name="T109">,</text:span></text:p>
      <text:p text:style-name="P110"><text:span text:style-name="T111"><text:s text:c="4"/></text:span><text:span text:style-name="T112">"marketingOptIn"</text:span><text:span text:style-name="T113">:<text:s/></text:span><text:span text:style-name="T114">true</text:span><text:span text:style-name="T115">,</text:span></text:p>
      <text:p text:style-name="P116"><text:span text:style-name="T117"><text:s text:c="4"/></text:span><text:span text:style-name="T118">"phoneVerified"</text:span><text:span text:style-name="T119">:<text:s/></text:span><text:span text:style-name="T120">true</text:span><text:span text:style-name="T121">,</text:span></text:p>
      <text:p text:style-name="P122"><text:span text:style-name="T123"><text:s text:c="4"/></text:span><text:span text:style-name="T124">"emailVerified"</text:span><text:span text:style-name="T125">:<text:s/></text:span><text:span text:style-name="T126">false</text:span><text:span text:style-name="T127">,</text:span></text:p>
      <text:p text:style-name="P128"><text:span text:style-name="T129"><text:s text:c="4"/></text:span><text:span text:style-name="T130">"externalId"</text:span><text:span text:style-name="T131">:<text:s/></text:span><text:span text:style-name="T132">"EXT-123456"</text:span><text:span text:style-name="T133">,</text:span></text:p>
      <text:p text:style-name="P134"><text:span text:style-name="T135"><text:s text:c="4"/></text:span><text:span text:style-name="T136">"status"</text:span><text:span text:style-name="T137">:<text:s/></text:span><text:span text:style-name="T138">"ACTIVE"</text:span><text:span text:style-name="T139">,</text:span></text:p>
      <text:p text:style-name="P140"><text:span text:style-name="T141"><text:s text:c="4"/></text:span><text:span text:style-name="T142">"metadata"</text:span><text:span text:style-name="T143">:<text:s/></text:span><text:span text:style-name="T144">"{\"source\":\"web\",\"campaign\":\"spring-sale\"}"</text:span><text:span text:style-name="T145">,</text:span></text:p>
      <text:p text:style-name="P146"><text:span text:style-name="T147"><text:s text:c="4"/></text:span><text:span text:style-name="T148">"createdAt"</text:span><text:span text:style-name="T149">:<text:s/></text:span><text:span text:style-name="T150">"2026-06-19T14:29:01"</text:span><text:span text:style-name="T151">,</text:span></text:p>
      <text:p text:style-name="P152"><text:span text:style-name="T153"><text:s text:c="4"/></text:span><text:span text:style-name="T154">"updatedAt"</text:span><text:span text:style-name="T155">:<text:s/></text:span><text:span text:style-name="T156">"2026-06-19T14:29:01"</text:span></text:p>
      <text:p text:style-name="P157"><text:s text:c="2"/>},</text:p>
      <text:p text:style-name="P158"><text:span text:style-name="T159"><text:s text:c="2"/></text:span><text:span text:style-name="T160">"tokens"</text:span><text:span text:style-name="T161">:<text:s/></text:span><text:span text:style-name="T162">147</text:span><text:span text:style-name="T163">,</text:span></text:p>
      <text:p text:style-name="P164"><text:span text:style-name="T165"><text:s text:c="2"/></text:span><text:span text:style-name="T166">"cost"</text:span><text:span text:style-name="T167">:<text:s/></text:span><text:span text:style-name="T168">0.001323</text:span></text:p>
      <text:p text:style-name="P169"><text:span text:style-name="T170">}</text:span></text:p>
      <text:p text:style-name="Normal"/>
      <text:p text:style-name="Normal"><draw:frame draw:style-name="a0" draw:name="Picture 1" text:anchor-type="as-char" svg:x="0in" svg:y="0in" svg:width="6.26806in" svg:height="2.5763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rkalmatti Prahlad, Priyanka</meta:initial-creator>
    <dc:creator>Kerkalmatti Prahlad, Priyanka</dc:creator>
    <meta:creation-date>2026-06-19T13:30:00Z</meta:creation-date>
    <dc:date>2026-06-19T14:07:00Z</dc:date>
    <meta:template xlink:href="Normal" xlink:type="simple"/>
    <meta:editing-cycles>1</meta:editing-cycles>
    <meta:editing-duration>PT2220S</meta:editing-duration>
    <meta:document-statistic meta:page-count="2" meta:paragraph-count="1" meta:word-count="147" meta:character-count="985" meta:row-count="6" meta:non-whitespace-character-count="839"/>
  </office:meta>
</office:document-meta>
</file>